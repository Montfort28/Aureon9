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one in the canvas as <text:span text:style-name="Strong_20_Emphasis">“Aureon9-review-workflows-wiring.”</text:span></text:p>
      <text:p text:style-name="Text_20_body">It includes:</text:p>
      <text:list text:style-name="L1">
        <text:list-item>
          <text:p text:style-name="P1"><text:span text:style-name="Strong_20_Emphasis">Prisma schema extensions</text:span> for queue states, review actions, and document review status</text:p>
        </text:list-item>
        <text:list-item>
          <text:p text:style-name="P1"><text:span text:style-name="Strong_20_Emphasis">storage abstraction</text:span> for signed uploads</text:p>
        </text:list-item>
        <text:list-item>
          <text:p text:style-name="P1"><text:span text:style-name="Strong_20_Emphasis">upload URL</text:span> and <text:span text:style-name="Strong_20_Emphasis">finalize upload</text:span> APIs</text:p>
        </text:list-item>
        <text:list-item>
          <text:p text:style-name="P1"><text:span text:style-name="Strong_20_Emphasis">review queue retrieval</text:span> API</text:p>
        </text:list-item>
        <text:list-item>
          <text:p text:style-name="P1">action endpoints for:</text:p>
          <text:list>
            <text:list-item>
              <text:p text:style-name="P1">assign reviewer</text:p>
            </text:list-item>
            <text:list-item>
              <text:p text:style-name="P1">request more documents</text:p>
            </text:list-item>
            <text:list-item>
              <text:p text:style-name="P1">escalate</text:p>
            </text:list-item>
            <text:list-item>
              <text:p text:style-name="P1">approve</text:p>
            </text:list-item>
            <text:list-item>
              <text:p text:style-name="P1">reject</text:p>
            </text:list-item>
          </text:list>
        </text:list-item>
        <text:list-item>
          <text:p text:style-name="P1">frontend wiring examples for:</text:p>
          <text:list>
            <text:list-item>
              <text:p text:style-name="P1">document upload</text:p>
            </text:list-item>
            <text:list-item>
              <text:p text:style-name="P1">review actions</text:p>
            </text:list-item>
          </text:list>
        </text:list-item>
        <text:list-item>
          <text:p text:style-name="P1">role enforcement and risk escalation rules</text:p>
        </text:list-item>
        <text:list-item>
          <text:p text:style-name="P1">recommended notification hooks</text:p>
        </text:list-item>
        <text:list-item>
          <text:p text:style-name="P1">implementation order</text:p>
        </text:list-item>
      </text:list>
      <text:p text:style-name="Text_20_body">This now connects your earlier AUREON9 layers into a real workflow:</text:p>
      <text:list text:style-name="L2">
        <text:list-item>
          <text:p text:style-name="P2">upload document</text:p>
        </text:list-item>
        <text:list-item>
          <text:p text:style-name="P2">persist metadata</text:p>
        </text:list-item>
        <text:list-item>
          <text:p text:style-name="P2">create or update review case</text:p>
        </text:list-item>
        <text:list-item>
          <text:p text:style-name="P2">move through governed queue states</text:p>
        </text:list-item>
        <text:list-item>
          <text:p text:style-name="P2">write audit trail at every action</text:p>
        </text:list-item>
      </text:list>
      <text:p text:style-name="Text_20_body">The next strongest build is <text:span text:style-name="Strong_20_Emphasis">notification service + email/in-app templates + queue automations</text:span> so members and reviewers are prompted automatically at each workflow step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1T17:07:24.029991000</meta:creation-date>
    <dc:date>2026-04-21T17:07:56.619765000</dc:date>
    <meta:editing-duration>PT33S</meta:editing-duration>
    <meta:editing-cycles>1</meta:editing-cycles>
    <meta:document-statistic meta:table-count="0" meta:image-count="0" meta:object-count="0" meta:page-count="1" meta:paragraph-count="25" meta:word-count="141" meta:character-count="863" meta:non-whitespace-character-count="768"/>
    <meta:generator>LibreOffice/26.2.0.3$MacOSX_AARCH64 LibreOffice_project/afbbd0df0edb6d40b450b0337ac646b0913a760c</meta:generator>
  </office:meta>
</office:document-meta>
</file>